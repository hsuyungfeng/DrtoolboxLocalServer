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宋体" svg:font-family="宋体"/>
  </office:font-face-decls>
  <office:automatic-styles>
    <style:style style:name="P1" style:family="paragraph" style:parent-style-name="Footer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fo:language="en" fo:country="US" style:font-name-asian="Noto Serif CJK TC" style:font-size-asian="9pt" style:language-asian="zh" style:country-asian="TW"/>
    </style:style>
    <style:style style:name="P2" style:family="paragraph" style:parent-style-name="Header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language="en" fo:country="US" style:font-name-asian="Noto Serif CJK TC" style:language-asian="zh" style:country-asian="TW"/>
    </style:style>
    <style:style style:name="P3" style:family="paragraph" style:parent-style-name="Header">
      <style:paragraph-properties fo:line-height="100%" fo:text-align="justify" style:justify-single-word="false" fo:orphans="0" fo:widows="0" fo:padding-left="0.141cm" fo:padding-right="0.141cm" fo:padding-top="0.035cm" fo:padding-bottom="0.035cm" fo:border="none" style:shadow="none" style:snap-to-layout-grid="false" style:writing-mode="lr-tb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line-height="0.741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</style:style>
    <style:style style:name="P5" style:family="paragraph" style:parent-style-name="Standard">
      <style:paragraph-properties fo:margin-left="0cm" fo:margin-right="0cm" fo:line-height="0.741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fo:color="#000000" loext:opacity="100%" style:font-name="宋体" fo:font-size="12pt" style:font-name-asian="Noto Serif CJK TC" style:font-size-asian="12pt" style:language-asian="zh" style:country-asian="TW" style:font-name-complex="宋体" style:font-size-complex="12pt"/>
    </style:style>
    <style:style style:name="P6" style:family="paragraph" style:parent-style-name="Standard">
      <style:paragraph-properties style:snap-to-layout-grid="false"/>
      <style:text-properties fo:font-size="9pt" style:font-size-asian="9pt" style:language-asian="zh" style:country-asian="CN"/>
    </style:style>
    <style:style style:name="P7" style:family="paragraph" style:parent-style-name="Standard" style:master-page-name="Standard">
      <style:paragraph-properties fo:margin-left="0cm" fo:margin-right="0cm" fo:line-height="0.741cm" fo:text-align="justify" style:justify-single-word="false" fo:keep-together="auto" fo:orphans="0" fo:widows="0" fo:text-indent="0cm" style:auto-text-indent="false" style:page-number="1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-asian="Noto Serif CJK TC" style:language-asian="zh" style:country-asian="TW"/>
    </style:style>
    <style:style style:name="P8" style:family="paragraph" style:parent-style-name="Standard">
      <style:paragraph-properties fo:margin-left="0cm" fo:margin-right="0cm" fo:line-height="0.741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-asian="Noto Serif CJK TC" style:language-asian="zh" style:country-asian="TW"/>
    </style:style>
    <style:style style:name="T1" style:family="text">
      <style:text-properties fo:color="#000000" loext:opacity="100%" style:font-name="宋体" fo:font-size="12pt" style:font-size-asian="12pt" style:font-name-complex="宋体" style:font-size-complex="12pt"/>
    </style:style>
    <style:style style:name="T2" style:family="text">
      <style:text-properties fo:color="#000000" loext:opacity="100%" style:font-name="宋体" fo:font-size="12pt" style:font-name-asian="宋体" style:font-size-asian="12pt" style:language-asian="zh" style:country-asian="CN" style:font-name-complex="宋体" style:font-size-complex="12pt"/>
    </style:style>
    <style:style style:name="T3" style:family="text">
      <style:text-properties fo:color="#000000" loext:opacity="100%" style:font-name="宋体" fo:font-size="12pt" officeooo:rsid="00163cc0" style:font-name-asian="宋体" style:font-size-asian="12pt" style:language-asian="zh" style:country-asian="CN" style:font-name-complex="宋体" style:font-size-complex="12pt"/>
    </style:style>
    <style:style style:name="T4" style:family="text">
      <style:text-properties fo:color="#000000" loext:opacity="100%" style:font-name="宋体" fo:font-size="12pt" fo:language="en" fo:country="US" style:letter-kerning="true" style:font-name-asian="宋体" style:font-size-asian="12pt" style:language-asian="zh" style:country-asian="CN" style:font-name-complex="宋体" style:font-size-complex="12pt" style:language-complex="ar" style:country-complex="SA"/>
    </style:style>
    <style:style style:name="T5" style:family="text">
      <style:text-properties fo:color="#000000" loext:opacity="100%" style:font-name="宋体" fo:font-size="12pt" fo:language="en" fo:country="US" style:letter-kerning="true" style:font-size-asian="12pt" style:font-name-complex="宋体" style:font-size-complex="12pt" style:language-complex="ar" style:country-complex="SA"/>
    </style:style>
    <style:style style:name="T6" style:family="text">
      <style:text-properties fo:color="#000000" loext:opacity="100%" style:font-name="宋体" fo:font-size="12pt" fo:language="en" fo:country="US" style:letter-kerning="true" style:font-name-asian="Noto Serif CJK TC" style:font-size-asian="12pt" style:language-asian="zh" style:country-asian="TW" style:font-name-complex="宋体" style:font-size-complex="12pt" style:language-complex="ar" style:country-complex="SA"/>
    </style:style>
    <style:style style:name="T7" style:family="text">
      <style:text-properties fo:color="#000000" loext:opacity="100%" style:font-name="宋体" fo:font-size="12pt" style:font-name-asian="Noto Serif CJK TC" style:font-size-asian="12pt" style:language-asian="zh" style:country-asian="TW" style:font-name-complex="宋体" style:font-size-complex="12pt"/>
    </style:style>
    <style:style style:name="T8" style:family="text">
      <style:text-properties fo:color="#000000" loext:opacity="100%" style:font-name="宋体" fo:font-size="12pt" officeooo:rsid="00163cc0" style:font-name-asian="Noto Serif CJK TC" style:font-size-asian="12pt" style:language-asian="zh" style:country-asian="TW" style:font-name-complex="宋体" style:font-size-complex="12pt"/>
    </style:style>
    <style:style style:name="T9" style:family="text">
      <style:text-properties fo:font-size="9pt" fo:language="en" fo:country="US" style:font-size-asian="9pt" style:language-asian="zh" style:country-asian="CN"/>
    </style:style>
    <style:style style:name="T10" style:family="text">
      <style:text-properties fo:language="en" fo:country="US" style:language-asian="zh" style:country-asian="CN"/>
    </style:style>
    <style:style style:name="T11" style:family="text">
      <style:text-properties fo:language="en" fo:country="US" officeooo:rsid="00163cc0" style:language-asian="zh" style:country-asian="CN"/>
    </style:style>
    <style:style style:name="T12" style:family="text">
      <style:text-properties fo:language="en" fo:country="US" style:font-name-asian="Noto Serif CJK TC" style:language-asian="zh" style:country-asian="TW"/>
    </style:style>
    <style:style style:name="T13" style:family="text">
      <style:text-properties style:font-name-asian="Noto Serif CJK TC" style:language-asian="zh" style:country-asian="TW"/>
    </style:style>
    <style:style style:name="T14" style:family="text">
      <style:text-properties style:use-window-font-color="true" loext:opacity="0%" style:font-name="Times New Roman" fo:font-size="9pt" fo:language="en" fo:country="US" style:letter-kerning="true" style:font-name-asian="宋体" style:font-size-asian="9pt" style:language-asian="zh" style:country-asian="CN" style:font-name-complex="Times New Roman" style:font-size-complex="10.5pt" style:language-complex="ar" style:country-complex="SA"/>
    </style:style>
    <style:style style:name="T15" style:family="text">
      <style:text-properties style:use-window-font-color="true" loext:opacity="0%" style:font-name="Times New Roman" fo:font-size="9pt" fo:language="en" fo:country="US" style:letter-kerning="true" style:font-name-asian="Noto Serif CJK TC" style:font-size-asian="9pt" style:language-asian="zh" style:country-asian="TW" style:font-name-complex="Times New Roman" style:font-size-complex="10.5pt" style:language-complex="ar" style:country-complex="SA"/>
    </style:style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fo:padding="0.002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一</text:span><text:span text:style-name="T5">場顧</text:span><text:span text:style-name="T1">客婚姻突</text:span><text:span text:style-name="T5">變</text:span><text:span text:style-name="T1">引</text:span><text:span text:style-name="T5">發</text:span><text:span text:style-name="T1">的大</text:span><text:span text:style-name="T5">單</text:span><text:span text:style-name="T1"> 看咨</text:span><text:span text:style-name="T5">詢師</text:span><text:span text:style-name="T1">董冰如何操作全</text:span><text:span text:style-name="T5">槃</text:span></text:p>
      <text:p text:style-name="P5"/>
      <text:p text:style-name="P5"/>
      <text:p text:style-name="P5"/>
      <text:p text:style-name="P5"/>
      <text:p text:style-name="P4"><text:span text:style-name="T6">趙</text:span><text:span text:style-name="T7">小青自</text:span><text:span text:style-name="T6">從</text:span><text:span text:style-name="T7">上次去了新天整形</text:span><text:span text:style-name="T6">醫</text:span><text:span text:style-name="T7">院咨</text:span><text:span text:style-name="T6">詢過</text:span><text:span text:style-name="T7">后，知道原</text:span><text:span text:style-name="T6">來</text:span><text:span text:style-name="T7">想恢</text:span><text:span text:style-name="T6">復</text:span><text:span text:style-name="T7">到</text:span><text:span text:style-name="T6">產</text:span><text:span text:style-name="T7">前</text:span><text:span text:style-name="T6">狀態</text:span><text:span text:style-name="T7">，需要付出</text:span><text:span text:style-name="T6">這</text:span><text:span text:style-name="T7">么大的代</text:span><text:span text:style-name="T6">價</text:span><text:span text:style-name="T7">，</text:span><text:span text:style-name="T6">雖</text:span><text:span text:style-name="T7">然老公手里有</text:span><text:span text:style-name="T6">點錢</text:span><text:span text:style-name="T7">，但</text:span><text:span text:style-name="T6">對於節儉慣</text:span><text:span text:style-name="T7">了的她，</text:span><text:span text:style-name="T6">實</text:span><text:span text:style-name="T7">在是不</text:span><text:span text:style-name="T6">願</text:span><text:span text:style-name="T7">意去花。事情就</text:span><text:span text:style-name="T6">這樣過</text:span><text:span text:style-name="T7">去了2年，有一天她突然通</text:span><text:span text:style-name="T6">過網絡預約</text:span><text:span text:style-name="T7">跑到了佳美整形</text:span><text:span text:style-name="T6">醫</text:span><text:span text:style-name="T7">院找到了咨</text:span><text:span text:style-name="T6">詢師</text:span><text:span text:style-name="T7">董冰，</text:span><text:span text:style-name="T6">說</text:span><text:span text:style-name="T7">她要做整形，要大整！</text:span><text:span text:style-name="T6">這</text:span><text:span text:style-name="T7">到底是怎么回事呢？</text:span><text:span text:style-name="T6">這兩</text:span><text:span text:style-name="T7">年</text:span><text:span text:style-name="T6">時間發</text:span><text:span text:style-name="T7">生了什么事情呢？</text:span></text:p>
      <text:p text:style-name="P5"/>
      <text:p text:style-name="P8"><text:span text:style-name="T1">咨</text:span><text:span text:style-name="T5">詢師</text:span><text:span text:style-name="T1">董冰：你好啊，小青，</text:span><text:span text:style-name="T5">兩</text:span><text:span text:style-name="T1">年</text:span><text:span text:style-name="T5">沒</text:span><text:span text:style-name="T1">有</text:span><text:span text:style-name="T5">見</text:span><text:span text:style-name="T1">面了，你怎么</text:span><text:span text:style-name="T5">這</text:span><text:span text:style-name="T1">么憔悴啊？</text:span><text:span text:style-name="T5">發</text:span><text:span text:style-name="T1">生什么事情了</text:span><text:span text:style-name="T5">嗎</text:span><text:span text:style-name="T1">？（</text:span><text:span text:style-name="T5">對於</text:span><text:span text:style-name="T1">你的老</text:span><text:span text:style-name="T5">顧</text:span><text:span text:style-name="T1">客，一定要第一</text:span><text:span text:style-name="T5">時間發現</text:span><text:span text:style-name="T1">她的</text:span><text:span text:style-name="T5">變</text:span><text:span text:style-name="T1">化和</text:span><text:span text:style-name="T5">狀態</text:span><text:span text:style-name="T1">！</text:span><text:span text:style-name="T5">這</text:span><text:span text:style-name="T1">是你</text:span><text:span text:style-name="T5">愛</text:span><text:span text:style-name="T1">心的表</text:span><text:span text:style-name="T5">現</text:span><text:span text:style-name="T1">！）</text:span></text:p>
      <text:p text:style-name="P8"><text:span text:style-name="T5">顧</text:span><text:span text:style-name="T1">客</text:span><text:span text:style-name="T5">趙</text:span><text:span text:style-name="T1">小青：董</text:span><text:span text:style-name="T5">醫</text:span><text:span text:style-name="T1">生！我不想活了！我不想活了！我后悔</text:span><text:span text:style-name="T5">當</text:span><text:span text:style-name="T1">初</text:span><text:span text:style-name="T5">沒</text:span><text:span text:style-name="T1">有</text:span><text:span text:style-name="T5">聽</text:span><text:span text:style-name="T1">你的</text:span><text:span text:style-name="T5">話</text:span><text:span text:style-name="T1">啊，我后悔死了！（</text:span><text:span text:style-name="T5">顧</text:span><text:span text:style-name="T1">客情</text:span><text:span text:style-name="T5">緒</text:span><text:span text:style-name="T1">激</text:span><text:span text:style-name="T5">動</text:span><text:span text:style-name="T1">，明</text:span><text:span text:style-name="T5">顯</text:span><text:span text:style-name="T1">是遇到了大的生活挫折！董冰此</text:span><text:span text:style-name="T5">時</text:span><text:span text:style-name="T1">已</text:span><text:span text:style-name="T5">經</text:span><text:span text:style-name="T1">想到了是什么！）</text:span></text:p>
      <text:p text:style-name="P5"/>
      <text:p text:style-name="P8"><text:span text:style-name="T1">原</text:span><text:span text:style-name="T5">來</text:span><text:span text:style-name="T1">小青生完孩子后，一直在家做全</text:span><text:span text:style-name="T5">職</text:span><text:span text:style-name="T1">太太，因</text:span><text:span text:style-name="T5">為</text:span><text:span text:style-name="T1">平</text:span><text:span text:style-name="T5">時</text:span><text:span text:style-name="T1">只和孩子在一起，要么就是和小</text:span><text:span text:style-name="T5">區</text:span><text:span text:style-name="T1">的大</text:span><text:span text:style-name="T5">媽</text:span><text:span text:style-name="T1">、大</text:span><text:span text:style-name="T5">嬸們</text:span><text:span text:style-name="T1">在一起</text:span><text:span text:style-name="T5">帶</text:span><text:span text:style-name="T1">孩子，身</text:span><text:span text:style-name="T5">體變</text:span><text:span text:style-name="T1">得越</text:span><text:span text:style-name="T5">來</text:span><text:span text:style-name="T1">越胖，皮</text:span><text:span text:style-name="T5">膚</text:span><text:span text:style-name="T1">也</text:span><text:span text:style-name="T5">懶</text:span><text:span text:style-name="T1">得</text:span><text:span text:style-name="T5">護</text:span><text:span text:style-name="T1">理！用老</text:span><text:soft-page-break/><text:span text:style-name="T1">公的</text:span><text:span text:style-name="T5">話</text:span><text:span text:style-name="T1">就是，</text:span><text:span text:style-name="T5">別</text:span><text:span text:style-name="T1">人怎么生完孩子</text:span><text:span text:style-name="T5">還</text:span><text:span text:style-name="T1">能恢</text:span><text:span text:style-name="T5">復</text:span><text:span text:style-name="T1">的那么好，你怎么</text:span><text:span text:style-name="T5">現</text:span><text:span text:style-name="T1">在越</text:span><text:span text:style-name="T5">來</text:span><text:span text:style-name="T1">越胖了，</text:span><text:span text:style-name="T5">沒</text:span><text:span text:style-name="T1">法看了！正如</text:span><text:span text:style-name="T5">兩</text:span><text:span text:style-name="T1">年前董冰所</text:span><text:span text:style-name="T5">說</text:span><text:span text:style-name="T1">，男人不</text:span><text:span text:style-name="T5">變</text:span><text:span text:style-name="T1">心是所受到的</text:span><text:span text:style-name="T5">誘</text:span><text:span text:style-name="T1">惑不</text:span><text:span text:style-name="T5">夠</text:span><text:span text:style-name="T1">大，</text:span><text:span text:style-name="T5">隨</text:span><text:span text:style-name="T1">着老公的事</text:span><text:span text:style-name="T5">業</text:span><text:span text:style-name="T1">越做越大，他身</text:span><text:span text:style-name="T5">邊</text:span><text:span text:style-name="T1">的女人</text:span><text:span text:style-name="T5">開</text:span><text:span text:style-name="T1">始</text:span><text:span text:style-name="T5">變</text:span><text:span text:style-name="T1">得多了起</text:span><text:span text:style-name="T5">來</text:span><text:span text:style-name="T1">，和公司一位</text:span><text:span text:style-name="T5">財務總監</text:span><text:span text:style-name="T1">露西的</text:span><text:span text:style-name="T5">曖</text:span><text:span text:style-name="T1">昧，</text:span><text:span text:style-name="T5">開</text:span><text:span text:style-name="T1">始源源不</text:span><text:span text:style-name="T5">斷傳</text:span><text:span text:style-name="T1">到小青的耳朵里。起初她并不相信，但直到老公跟她提出</text:span><text:span text:style-name="T5">離</text:span><text:span text:style-name="T1">婚，她才慌了手</text:span><text:span text:style-name="T5">腳</text:span><text:span text:style-name="T1">！</text:span></text:p>
      <text:p text:style-name="P5"/>
      <text:p text:style-name="P8"><text:span text:style-name="T1">咨</text:span><text:span text:style-name="T5">詢師</text:span><text:span text:style-name="T1">董冰：事情已</text:span><text:span text:style-name="T5">經發</text:span><text:span text:style-name="T1">生了，就不要再去后悔什么，我</text:span><text:span text:style-name="T5">現</text:span><text:span text:style-name="T1">在就</text:span><text:span text:style-name="T5">問</text:span><text:span text:style-name="T1">你，是否想跟你老公</text:span><text:span text:style-name="T5">離</text:span><text:span text:style-name="T1">婚！他把</text:span><text:span text:style-name="T5">財產</text:span><text:span text:style-name="T1">分你一半，是否可以接受</text:span><text:span text:style-name="T5">這個離</text:span><text:span text:style-name="T1">婚的</text:span><text:span text:style-name="T5">條</text:span><text:span text:style-name="T1">件？（</text:span><text:span text:style-name="T5">幫</text:span><text:span text:style-name="T1">助</text:span><text:span text:style-name="T5">顧</text:span><text:span text:style-name="T1">客提供解</text:span><text:span text:style-name="T5">決問題</text:span><text:span text:style-name="T1">的方法，可以</text:span><text:span text:style-name="T5">贏</text:span><text:span text:style-name="T1">得</text:span><text:span text:style-name="T5">顧</text:span><text:span text:style-name="T1">客的信任，但你一定要衡量自己是否可以</text:span><text:span text:style-name="T5">勝</text:span><text:span text:style-name="T1">任！）</text:span></text:p>
      <text:p text:style-name="P4"><text:span text:style-name="T6">顧</text:span><text:span text:style-name="T7">客</text:span><text:span text:style-name="T6">趙</text:span><text:span text:style-name="T7">小青：接受不了，我不</text:span><text:span text:style-name="T6">願</text:span><text:span text:style-name="T7">意失去他，只要他</text:span><text:span text:style-name="T6">現</text:span><text:span text:style-name="T7">在能回</text:span><text:span text:style-name="T6">頭</text:span><text:span text:style-name="T7">，我可以既往不咎！（30</text:span><text:span text:style-name="T6">歲</text:span><text:span text:style-name="T7">的女人</text:span><text:span text:style-name="T6">誰</text:span><text:span text:style-name="T7">不在意自己</text:span><text:span text:style-name="T6">經營</text:span><text:span text:style-name="T7">的婚姻，</text:span><text:span text:style-name="T6">誰願</text:span><text:span text:style-name="T7">意</text:span><text:span text:style-name="T6">輕</text:span><text:span text:style-name="T7">易放</text:span><text:span text:style-name="T6">棄</text:span><text:span text:style-name="T7">呢！）</text:span></text:p>
      <text:p text:style-name="P5"/>
      <text:p text:style-name="P8"><text:span text:style-name="T1">咨</text:span><text:span text:style-name="T5">詢師</text:span><text:span text:style-name="T1">董冰：他是跟</text:span><text:span text:style-name="T5">誰</text:span><text:span text:style-name="T1">好了？什么情</text:span><text:span text:style-name="T5">況</text:span><text:span text:style-name="T1">，</text:span><text:span text:style-name="T5">這兩</text:span><text:span text:style-name="T1">年你一</text:span><text:span text:style-name="T5">點變</text:span><text:span text:style-name="T1">化都</text:span><text:span text:style-name="T5">沒</text:span><text:span text:style-name="T1">有</text:span><text:span text:style-name="T5">嗎</text:span><text:span text:style-name="T1">？（此</text:span><text:span text:style-name="T5">時</text:span><text:span text:style-name="T1">董冰的</text:span><text:span text:style-name="T5">話</text:span><text:span text:style-name="T1">再</text:span><text:span text:style-name="T5">難聽</text:span><text:span text:style-name="T1">，</text:span><text:span text:style-name="T5">顧</text:span><text:span text:style-name="T1">客也是可以</text:span><text:span text:style-name="T5">聽進</text:span><text:span text:style-name="T1">去的，因</text:span><text:span text:style-name="T5">為</text:span><text:span text:style-name="T1">她已</text:span><text:span text:style-name="T5">經沒</text:span><text:span text:style-name="T1">有了</text:span><text:span text:style-name="T5">兩</text:span><text:span text:style-name="T1">年前的甜蜜！）</text:span></text:p>
      <text:p text:style-name="P8"><text:span text:style-name="T5">顧</text:span><text:span text:style-name="T1">客</text:span><text:span text:style-name="T5">趙</text:span><text:span text:style-name="T1">小青：跟他</text:span><text:span text:style-name="T5">們</text:span><text:span text:style-name="T1">公司的</text:span><text:span text:style-name="T5">財務總監</text:span><text:span text:style-name="T1">，露西。我</text:span><text:span text:style-name="T5">見過</text:span><text:span text:style-name="T1">那</text:span><text:span text:style-name="T5">個</text:span><text:span text:style-name="T1">女孩，</text:span><text:span text:style-name="T5">媽媽</text:span><text:span text:style-name="T1">是西班牙人，爸爸是福建人，很性感。起初我以</text:span><text:span text:style-name="T5">為</text:span><text:span text:style-name="T1">她有男朋友，不</text:span><text:span text:style-name="T5">會</text:span><text:span text:style-name="T1">跟我老公有什么，老公平</text:span><text:span text:style-name="T5">時</text:span><text:span text:style-name="T1">出差</text:span><text:span text:style-name="T5">帶</text:span><text:span text:style-name="T1">着她，也都</text:span><text:span text:style-name="T5">會</text:span><text:span text:style-name="T1">告</text:span><text:span text:style-name="T5">訴</text:span><text:span text:style-name="T1">我，但我相信老公不</text:span><text:span text:style-name="T5">會</text:span><text:span text:style-name="T1">做</text:span><text:span text:style-name="T5">過</text:span><text:span text:style-name="T1">分的事情。直到他跟我提出</text:span><text:span text:style-name="T5">離</text:span><text:span text:style-name="T1">婚，我才知道自己真的是太傻了！他</text:span><text:span text:style-name="T5">說</text:span><text:span text:style-name="T1">跟她在一起充</text:span><text:span text:style-name="T5">滿</text:span><text:span text:style-name="T1">活力，她很可</text:span><text:span text:style-name="T5">愛</text:span><text:span text:style-name="T1">，很</text:span><text:span text:style-name="T5">單純</text:span><text:span text:style-name="T1">，又活</text:span><text:span text:style-name="T5">潑</text:span><text:span text:style-name="T1">，又漂亮，跟她在一起找到了年</text:span><text:span text:style-name="T5">輕時</text:span><text:span text:style-name="T1">候的感</text:span><text:span text:style-name="T5">覺</text:span><text:span text:style-name="T1">，他要和她在一起，她不</text:span><text:span text:style-name="T5">會</text:span><text:span text:style-name="T1">管他抽</text:span><text:span text:style-name="T5">煙</text:span><text:span text:style-name="T1">喝酒，不</text:span><text:span text:style-name="T5">會</text:span><text:span text:style-name="T1">嫌他</text:span><text:span text:style-name="T5">亂</text:span><text:span text:style-name="T1">扔</text:span><text:span text:style-name="T5">東</text:span><text:span text:style-name="T1">西，</text:span><text:span text:style-name="T5">會幫</text:span><text:span text:style-name="T1">他洗衣服，陪他爬</text:span><text:span text:style-name="T5">長</text:span><text:span text:style-name="T1">城！跟她在一起是充</text:span><text:span text:style-name="T5">滿</text:span><text:soft-page-break/><text:span text:style-name="T1">幸福的，</text:span><text:span text:style-name="T5">還說</text:span><text:span text:style-name="T1">我</text:span><text:span text:style-name="T5">們</text:span><text:span text:style-name="T1">的生活太乏味了，太</text:span><text:span text:style-name="T5">沒</text:span><text:span text:style-name="T1">有新意了，就</text:span><text:span text:style-name="T5">連</text:span><text:span text:style-name="T1">做</text:span><text:span text:style-name="T5">愛</text:span><text:span text:style-name="T1">都像是例行公事一</text:span><text:span text:style-name="T5">樣</text:span><text:span text:style-name="T1">，</text:span><text:span text:style-name="T5">這樣</text:span><text:span text:style-name="T1">的婚姻</text:span><text:span text:style-name="T5">沒</text:span><text:span text:style-name="T1">有意</text:span><text:span text:style-name="T5">義</text:span><text:span text:style-name="T1">！（幸福的婚姻都是一</text:span><text:span text:style-name="T5">樣</text:span><text:span text:style-name="T1">的，不幸的婚姻</text:span><text:span text:style-name="T5">卻</text:span><text:span text:style-name="T1">各有不同！</text:span><text:span text:style-name="T5">顧</text:span><text:span text:style-name="T1">客此</text:span><text:span text:style-name="T5">時</text:span><text:span text:style-name="T1">的痛苦在</text:span><text:span text:style-name="T5">於</text:span><text:span text:style-name="T1">家庭即</text:span><text:span text:style-name="T5">將</text:span><text:span text:style-name="T1">破裂！咨</text:span><text:span text:style-name="T5">詢師</text:span><text:span text:style-name="T1">此</text:span><text:span text:style-name="T5">時</text:span><text:span text:style-name="T1">要首先</text:span><text:span text:style-name="T5">幫</text:span><text:span text:style-name="T1">助</text:span><text:span text:style-name="T5">顧</text:span><text:span text:style-name="T1">客</text:span><text:span text:style-name="T5">緩</text:span><text:span text:style-name="T1">解痛苦，</text:span><text:span text:style-name="T5">盡</text:span><text:span text:style-name="T1">管她是</text:span><text:span text:style-name="T5">來</text:span><text:span text:style-name="T1">整形的，但如果不整心，再整形也是</text:span><text:span text:style-name="T5">沒</text:span><text:span text:style-name="T1">有用的！）</text:span></text:p>
      <text:p text:style-name="P5"/>
      <text:p text:style-name="P8"><text:span text:style-name="T5">說</text:span><text:span text:style-name="T1">到</text:span><text:span text:style-name="T5">這</text:span><text:span text:style-name="T1">里，小青再也控制不住，</text:span><text:span text:style-name="T5">淚</text:span><text:span text:style-name="T1">流</text:span><text:span text:style-name="T5">滿</text:span><text:span text:style-name="T1">面。她</text:span><text:span text:style-name="T5">沒</text:span><text:span text:style-name="T1">有想到自己曾</text:span><text:span text:style-name="T5">經</text:span><text:span text:style-name="T1">那么信任，那么值得依靠，那么值得</text:span><text:span text:style-name="T5">驕</text:span><text:span text:style-name="T1">傲的老公，如今</text:span><text:span text:style-name="T5">卻</text:span><text:span text:style-name="T1">移情</text:span><text:span text:style-name="T5">別戀</text:span><text:span text:style-name="T1">，</text:span><text:span text:style-name="T5">拋棄</text:span><text:span text:style-name="T1">自己！</text:span><text:span text:style-name="T5">當</text:span><text:span text:style-name="T1">老公跟她</text:span><text:span text:style-name="T5">說</text:span><text:span text:style-name="T1">要</text:span><text:span text:style-name="T5">離</text:span><text:span text:style-name="T1">婚的</text:span><text:span text:style-name="T5">時</text:span><text:span text:style-name="T1">候，她第一反</text:span><text:span text:style-name="T5">應</text:span><text:span text:style-name="T1">就是公司破</text:span><text:span text:style-name="T5">產</text:span><text:span text:style-name="T1">了，他得</text:span><text:span text:style-name="T5">絕</text:span><text:span text:style-name="T1">症了，</text:span><text:span text:style-name="T5">卻沒</text:span><text:span text:style-name="T1">有想到是因</text:span><text:span text:style-name="T5">為</text:span><text:span text:style-name="T1">有了</text:span><text:span text:style-name="T5">別</text:span><text:span text:style-name="T1">的女人！小青陷入了深深的</text:span><text:span text:style-name="T5">絕</text:span><text:span text:style-name="T1">望</text:span><text:span text:style-name="T5">當</text:span><text:span text:style-name="T1">中！</text:span></text:p>
      <text:p text:style-name="P5"/>
      <text:p text:style-name="P5"/>
      <text:p text:style-name="P5"/>
      <text:p text:style-name="P4"><text:span text:style-name="T7">咨</text:span><text:span text:style-name="T6">詢師</text:span><text:span text:style-name="T7">董冰：2年前你就</text:span><text:span text:style-name="T6">應該</text:span><text:span text:style-name="T7">想到今天了！你如果要我</text:span><text:span text:style-name="T6">幫</text:span><text:span text:style-name="T7">你，你就</text:span><text:span text:style-name="T6">聽</text:span><text:span text:style-name="T7">我的，我</text:span><text:span text:style-name="T6">們</text:span><text:span text:style-name="T7">一起打</text:span><text:span text:style-name="T6">贏這場</text:span><text:span text:style-name="T7">婚姻保</text:span><text:span text:style-name="T6">衛戰</text:span><text:span text:style-name="T7">，好不好！（</text:span><text:span text:style-name="T6">對於</text:span><text:span text:style-name="T7">失望和</text:span><text:span text:style-name="T6">絕</text:span><text:span text:style-name="T7">望中的</text:span><text:span text:style-name="T6">顧</text:span><text:span text:style-name="T7">客，一定要</text:span><text:span text:style-name="T6">給</text:span><text:span text:style-name="T7">她打</text:span><text:span text:style-name="T6">氣</text:span><text:span text:style-name="T7">，</text:span><text:span text:style-name="T6">給</text:span><text:span text:style-name="T7">她希望！如果她</text:span><text:span text:style-name="T6">徹</text:span><text:span text:style-name="T7">底失望了，</text:span><text:span text:style-name="T6">還會</text:span><text:span text:style-name="T7">做什么整形</text:span><text:span text:style-name="T6">嗎</text:span><text:span text:style-name="T7">？）</text:span></text:p>
      <text:p text:style-name="P8"><text:span text:style-name="T5">顧</text:span><text:span text:style-name="T1">客</text:span><text:span text:style-name="T5">趙</text:span><text:span text:style-name="T1">小青：好的，董</text:span><text:span text:style-name="T5">醫</text:span><text:span text:style-name="T1">生，你告</text:span><text:span text:style-name="T5">訴</text:span><text:span text:style-name="T1">我怎么做！（</text:span><text:span text:style-name="T5">絕</text:span><text:span text:style-name="T1">望中的</text:span><text:span text:style-name="T5">顧</text:span><text:span text:style-name="T1">客最需要的就是一根救命</text:span><text:span text:style-name="T5">繩</text:span><text:span text:style-name="T1">，一旦你</text:span><text:span text:style-name="T5">拋</text:span><text:span text:style-name="T1">向她，她一定</text:span><text:span text:style-name="T5">會</text:span><text:span text:style-name="T1">牢牢地抓住！）</text:span></text:p>
      <text:p text:style-name="P5"/>
      <text:p text:style-name="P4"><text:span text:style-name="T7">咨</text:span><text:span text:style-name="T6">詢師</text:span><text:span text:style-name="T7">董冰：你回去答</text:span><text:span text:style-name="T6">應</text:span><text:span text:style-name="T7">他，就</text:span><text:span text:style-name="T6">說</text:span><text:span text:style-name="T7">你同意</text:span><text:span text:style-name="T6">離</text:span><text:span text:style-name="T7">婚。你告</text:span><text:span text:style-name="T6">訴</text:span><text:span text:style-name="T7">他，你</text:span><text:span text:style-name="T6">現</text:span><text:span text:style-name="T7">在享受的，我在十年前已</text:span><text:span text:style-name="T6">經給過</text:span><text:span text:style-name="T7">你了，我</text:span><text:span text:style-name="T6">沒</text:span><text:span text:style-name="T7">有可</text:span><text:span text:style-name="T6">愛過嗎</text:span><text:span text:style-name="T7">？我</text:span><text:span text:style-name="T6">沒</text:span><text:span text:style-name="T7">有</text:span><text:span text:style-name="T6">單純過嗎</text:span><text:span text:style-name="T7">？我</text:span><text:span text:style-name="T6">沒</text:span><text:span text:style-name="T7">有</text:span><text:span text:style-name="T6">給過</text:span><text:span text:style-name="T7">你激情和快</text:span><text:span text:style-name="T6">樂</text:span><text:soft-page-break/><text:span text:style-name="T6">嗎</text:span><text:span text:style-name="T7">？你曾</text:span><text:span text:style-name="T6">經</text:span><text:span text:style-name="T7">在地</text:span><text:span text:style-name="T6">攤</text:span><text:span text:style-name="T7">上</text:span><text:span text:style-name="T6">買</text:span><text:span text:style-name="T7">的5</text:span><text:span text:style-name="T6">塊錢</text:span><text:span text:style-name="T7">一</text:span><text:span text:style-name="T6">個</text:span><text:span text:style-name="T7">的戒指我保存到</text:span><text:span text:style-name="T6">現</text:span><text:span text:style-name="T7">在！她</text:span><text:span text:style-name="T6">給</text:span><text:span text:style-name="T7">予你的不</text:span><text:span text:style-name="T6">過</text:span><text:span text:style-name="T7">是我曾</text:span><text:span text:style-name="T6">經給過</text:span><text:span text:style-name="T7">你的，你去找她吧，看你</text:span><text:span text:style-name="T6">們</text:span><text:span text:style-name="T7">能激情多</text:span><text:span text:style-name="T6">長時間</text:span><text:span text:style-name="T7">，你只不</text:span><text:span text:style-name="T6">過</text:span><text:span text:style-name="T7">是把我</text:span><text:span text:style-name="T6">們</text:span><text:span text:style-name="T7">走</text:span><text:span text:style-name="T6">過</text:span><text:span text:style-name="T7">的路，再走一遍！等你</text:span><text:span text:style-name="T6">們結</text:span><text:span text:style-name="T7">婚了，她也生孩子了，我看看你</text:span><text:span text:style-name="T6">還</text:span><text:span text:style-name="T7">能坐在</text:span><text:span text:style-name="T6">這</text:span><text:span text:style-name="T7">里跟我</text:span><text:span text:style-name="T6">談</text:span><text:span text:style-name="T7">什么天真、激情！（根</text:span><text:span text:style-name="T6">據顧</text:span><text:span text:style-name="T7">客的情</text:span><text:span text:style-name="T6">況</text:span><text:span text:style-name="T7">，</text:span><text:span text:style-name="T6">為顧</text:span><text:span text:style-name="T7">客提供切</text:span><text:span text:style-name="T6">實</text:span><text:span text:style-name="T7">可行的具</text:span><text:span text:style-name="T6">體實</text:span><text:span text:style-name="T7">施方案，要比空口的安慰</text:span><text:span text:style-name="T6">強</text:span><text:span text:style-name="T7">很多！）</text:span></text:p>
      <text:p text:style-name="P5"/>
      <text:p text:style-name="P8"><text:span text:style-name="T1">小青你要告</text:span><text:span text:style-name="T5">訴</text:span><text:span text:style-name="T1">她，我</text:span><text:span text:style-name="T5">們</text:span><text:span text:style-name="T1">也</text:span><text:span text:style-name="T5">愛過</text:span><text:span text:style-name="T1">，也浪漫激情</text:span><text:span text:style-name="T5">過</text:span><text:span text:style-name="T1">，但走</text:span><text:span text:style-name="T5">進</text:span><text:span text:style-name="T1">婚姻，角色就</text:span><text:span text:style-name="T5">復雜</text:span><text:span text:style-name="T1">了。在追求</text:span><text:span text:style-name="T5">愛</text:span><text:span text:style-name="T1">和激情的同</text:span><text:span text:style-name="T5">時</text:span><text:span text:style-name="T1">，身上</text:span><text:span text:style-name="T5">還</text:span><text:span text:style-name="T1">要承</text:span><text:span text:style-name="T5">擔</text:span><text:span text:style-name="T1">更多的</text:span><text:span text:style-name="T5">責</text:span><text:span text:style-name="T1">任。原</text:span><text:span text:style-name="T5">來給</text:span><text:span text:style-name="T1">老公的十分</text:span><text:span text:style-name="T5">愛</text:span><text:span text:style-name="T1">，就需要分出</text:span><text:span text:style-name="T5">來</text:span><text:span text:style-name="T1">一份</text:span><text:span text:style-name="T5">給</text:span><text:span text:style-name="T1">公公婆婆，分出</text:span><text:span text:style-name="T5">來</text:span><text:span text:style-name="T1">一份</text:span><text:span text:style-name="T5">給</text:span><text:span text:style-name="T1">自己的爸爸</text:span><text:span text:style-name="T5">媽媽們</text:span><text:span text:style-name="T1">，分出</text:span><text:span text:style-name="T5">來</text:span><text:span text:style-name="T1">一份</text:span><text:span text:style-name="T5">給</text:span><text:span text:style-name="T1">自己的孩子，</text:span><text:span text:style-name="T5">對</text:span><text:span text:style-name="T1">老公的十分</text:span><text:span text:style-name="T5">愛</text:span><text:span text:style-name="T1">，</text:span><text:span text:style-name="T5">結</text:span><text:span text:style-name="T1">婚后就</text:span><text:span text:style-name="T5">變</text:span><text:span text:style-name="T1">成了七分，</text:span><text:span text:style-name="T5">當</text:span><text:span text:style-name="T1">另外一份十分的</text:span><text:span text:style-name="T5">愛</text:span><text:span text:style-name="T1">向我</text:span><text:span text:style-name="T5">們進</text:span><text:span text:style-name="T1">攻的</text:span><text:span text:style-name="T5">時</text:span><text:span text:style-name="T1">候，我</text:span><text:span text:style-name="T5">們</text:span><text:span text:style-name="T1">就</text:span><text:span text:style-name="T5">會變</text:span><text:span text:style-name="T1">的不堪一</text:span><text:span text:style-name="T5">擊</text:span><text:span text:style-name="T1">！（咨</text:span><text:span text:style-name="T5">詢師</text:span><text:span text:style-name="T1">的丰富人生</text:span><text:span text:style-name="T5">經曆</text:span><text:span text:style-name="T1">是一道智慧的</text:span><text:span text:style-name="T5">風</text:span><text:span text:style-name="T1">景</text:span><text:span text:style-name="T5">線</text:span><text:span text:style-name="T1">，</text:span><text:span text:style-name="T5">沒</text:span><text:span text:style-name="T1">有</text:span><text:span text:style-name="T5">閱曆</text:span><text:span text:style-name="T1">的咨</text:span><text:span text:style-name="T5">詢師</text:span><text:span text:style-name="T1">是</text:span><text:span text:style-name="T5">說</text:span><text:span text:style-name="T1">不出</text:span><text:span text:style-name="T5">這樣</text:span><text:span text:style-name="T1">的</text:span><text:span text:style-name="T5">話來</text:span><text:span text:style-name="T1">的！）</text:span></text:p>
      <text:p text:style-name="P5"/>
      <text:p text:style-name="P8"><text:span text:style-name="T5">說</text:span><text:span text:style-name="T1">到</text:span><text:span text:style-name="T5">這</text:span><text:span text:style-name="T1">里，董冰眼眶也</text:span><text:span text:style-name="T5">溼潤</text:span><text:span text:style-name="T1">了！作</text:span><text:span text:style-name="T5">為</text:span><text:span text:style-name="T1">女人，她此</text:span><text:span text:style-name="T5">時</text:span><text:span text:style-name="T1">非常理解小青的感受，她已</text:span><text:span text:style-name="T5">經</text:span><text:span text:style-name="T1">下定</text:span><text:span text:style-name="T5">決</text:span><text:span text:style-name="T1">心，一定要</text:span><text:span text:style-name="T5">幫</text:span><text:span text:style-name="T1">助她，因</text:span><text:span text:style-name="T5">為</text:span><text:span text:style-name="T1">自己也曾</text:span><text:span text:style-name="T5">經經曆過這樣</text:span><text:span text:style-name="T1">的痛苦，自己也有</text:span><text:span text:style-name="T5">過</text:span><text:span text:style-name="T1">一段失</text:span><text:span text:style-name="T5">敗</text:span><text:span text:style-name="T1">的婚姻！</text:span></text:p>
      <text:p text:style-name="P5"/>
      <text:p text:style-name="P8"><text:span text:style-name="T5">顧</text:span><text:span text:style-name="T1">客</text:span><text:span text:style-name="T5">趙</text:span><text:span text:style-name="T1">小青：那我不是要</text:span><text:span text:style-name="T5">徹</text:span><text:span text:style-name="T1">底放</text:span><text:span text:style-name="T5">棄</text:span><text:span text:style-name="T1">了</text:span><text:span text:style-name="T5">嗎</text:span><text:span text:style-name="T1">？我不想</text:span><text:span text:style-name="T5">這樣</text:span><text:span text:style-name="T1">，不想拆散</text:span><text:span text:style-name="T5">這個</text:span><text:span text:style-name="T1">家庭，不想</text:span><text:span text:style-name="T5">讓</text:span><text:span text:style-name="T1">孩子</text:span><text:span text:style-name="T5">沒</text:span><text:span text:style-name="T1">有爸爸啊！（</text:span><text:span text:style-name="T5">顧</text:span><text:span text:style-name="T1">客的</text:span><text:span text:style-name="T5">決</text:span><text:span text:style-name="T1">心有</text:span><text:span text:style-name="T5">時</text:span><text:span text:style-name="T1">候需要你</text:span><text:span text:style-name="T5">來幫</text:span><text:span text:style-name="T1">她下，但做之前</text:span><text:span text:style-name="T5">請確</text:span><text:span text:style-name="T1">保你的能量有那么大！）</text:span></text:p>
      <text:p text:style-name="P5"><text:soft-page-break/></text:p>
      <text:p text:style-name="P8"><text:span text:style-name="T1">咨</text:span><text:span text:style-name="T5">詢師</text:span><text:span text:style-name="T1">董冰：你按我</text:span><text:span text:style-name="T5">說</text:span><text:span text:style-name="T1">的去做，因</text:span><text:span text:style-name="T5">為</text:span><text:span text:style-name="T1">他已</text:span><text:span text:style-name="T5">經</text:span><text:span text:style-name="T1">要跟你</text:span><text:span text:style-name="T5">離</text:span><text:span text:style-name="T1">婚了。如果我猜得不</text:span><text:span text:style-name="T5">錯</text:span><text:span text:style-name="T1">，一定是那</text:span><text:span text:style-name="T5">個</text:span><text:span text:style-name="T1">女孩</text:span><text:span text:style-name="T5">懷</text:span><text:span text:style-name="T1">了他的孩子，否</text:span><text:span text:style-name="T5">則</text:span><text:span text:style-name="T1">不</text:span><text:span text:style-name="T5">會這</text:span><text:span text:style-name="T1">么匆忙</text:span><text:span text:style-name="T5">讓</text:span><text:span text:style-name="T1">你</text:span><text:span text:style-name="T5">離</text:span><text:span text:style-name="T1">婚！你</text:span><text:span text:style-name="T5">現</text:span><text:span text:style-name="T1">在只有破釜沉舟，以退</text:span><text:span text:style-name="T5">為進</text:span><text:span text:style-name="T1">！同</text:span><text:span text:style-name="T5">時</text:span><text:span text:style-name="T1">，你也不要再</text:span><text:span text:style-name="T5">給</text:span><text:span text:style-name="T1">你的老公省什么</text:span><text:span text:style-name="T5">錢</text:span><text:span text:style-name="T1">了。要改</text:span><text:span text:style-name="T5">變</text:span><text:span text:style-name="T1">自己，如果你想</text:span><text:span text:style-name="T5">贏</text:span><text:span text:style-name="T1">得婚姻，就必</text:span><text:span text:style-name="T5">須</text:span><text:span text:style-name="T1">改</text:span><text:span text:style-name="T5">變</text:span><text:span text:style-name="T1">自己，</text:span><text:span text:style-name="T5">讓</text:span><text:span text:style-name="T1">自己</text:span><text:span text:style-name="T5">變</text:span><text:span text:style-name="T1">得更漂亮、更性感。打</text:span><text:span text:style-name="T5">敗</text:span><text:span text:style-name="T1">狐狸精的秘</text:span><text:span text:style-name="T5">訣</text:span><text:span text:style-name="T1">就是</text:span><text:span text:style-name="T5">讓</text:span><text:span text:style-name="T1">自己</text:span><text:span text:style-name="T5">變</text:span><text:span text:style-name="T1">成狐狸精！（要</text:span><text:span text:style-name="T5">給顧</text:span><text:span text:style-name="T1">客分析局</text:span><text:span text:style-name="T5">勢</text:span><text:span text:style-name="T1">，</text:span><text:span text:style-name="T5">兩</text:span><text:span text:style-name="T1">利相</text:span><text:span text:style-name="T5">權</text:span><text:span text:style-name="T1">取其重，</text:span><text:span text:style-name="T5">兩</text:span><text:span text:style-name="T1">害相</text:span><text:span text:style-name="T5">權</text:span><text:span text:style-name="T1">取其</text:span><text:span text:style-name="T5">輕</text:span><text:span text:style-name="T1">！站在</text:span><text:span text:style-name="T5">顧</text:span><text:span text:style-name="T1">客的</text:span><text:span text:style-name="T5">長遠</text:span><text:span text:style-name="T1">角度考</text:span><text:span text:style-name="T5">慮問題</text:span><text:span text:style-name="T1">，提供方案！）</text:span></text:p>
      <text:p text:style-name="P8"><text:span text:style-name="T5">顧</text:span><text:span text:style-name="T1">客</text:span><text:span text:style-name="T5">趙</text:span><text:span text:style-name="T1">小青：要</text:span><text:span text:style-name="T5">這樣嗎</text:span><text:span text:style-name="T1">？如果他真的同意了怎么</text:span><text:span text:style-name="T5">辦</text:span><text:span text:style-name="T1">？（</text:span><text:span text:style-name="T5">顧</text:span><text:span text:style-name="T1">客</text:span><text:span text:style-name="T5">總</text:span><text:span text:style-name="T1">是很</text:span><text:span text:style-name="T5">難</text:span><text:span text:style-name="T1">下</text:span><text:span text:style-name="T5">決斷</text:span><text:span text:style-name="T1">的，正所</text:span><text:span text:style-name="T5">謂</text:span><text:span text:style-name="T1">是</text:span><text:span text:style-name="T5">當</text:span><text:span text:style-name="T1">局者迷，旁</text:span><text:span text:style-name="T5">觀</text:span><text:span text:style-name="T1">者清！</text:span><text:span text:style-name="T5">關鍵時</text:span><text:span text:style-name="T1">刻要</text:span><text:span text:style-name="T5">給顧</text:span><text:span text:style-name="T1">客指明方向！）</text:span></text:p>
      <text:p text:style-name="P5"/>
      <text:p text:style-name="P8"><text:span text:style-name="T1">咨</text:span><text:span text:style-name="T5">詢師</text:span><text:span text:style-name="T1">董冰：小青你</text:span><text:span text:style-name="T5">沒</text:span><text:span text:style-name="T1">有退路，如果你不同意、拖延，他只</text:span><text:span text:style-name="T5">會</text:span><text:span text:style-name="T1">更加</text:span><text:span text:style-name="T5">煩</text:span><text:span text:style-name="T1">你！你必</text:span><text:span text:style-name="T5">須從現</text:span><text:span text:style-name="T1">在改</text:span><text:span text:style-name="T5">變</text:span><text:span text:style-name="T1">自己，放</text:span><text:span text:style-name="T5">開</text:span><text:span text:style-name="T1">老公，抱</text:span><text:span text:style-name="T5">緊</text:span><text:span text:style-name="T1">孩子！</text:span><text:span text:style-name="T5">這樣</text:span><text:span text:style-name="T1">你才能有</text:span><text:span text:style-name="T5">機會獲</text:span><text:span text:style-name="T1">得</text:span><text:span text:style-name="T5">勝</text:span><text:span text:style-name="T1">利！如果成功，你挽救了家庭，如果失</text:span><text:span text:style-name="T5">敗</text:span><text:span text:style-name="T1">，你</text:span><text:span text:style-name="T5">獲</text:span><text:span text:style-name="T1">得了新的人生，你再也不用</text:span><text:span text:style-name="T5">當</text:span><text:span text:style-name="T1">他免</text:span><text:span text:style-name="T5">費</text:span><text:span text:style-name="T1">的保姆，</text:span><text:span text:style-name="T5">為</text:span><text:span text:style-name="T1">他熨衣服、打理家</text:span><text:span text:style-name="T5">務</text:span><text:span text:style-name="T1">，照看孩子，再也不用想方</text:span><text:span text:style-name="T5">設</text:span><text:span text:style-name="T1">法的去做他喜</text:span><text:span text:style-name="T5">歡</text:span><text:span text:style-name="T1">吃的</text:span><text:span text:style-name="T5">飯</text:span><text:span text:style-name="T1">，再也不用</text:span><text:span text:style-name="T5">擔</text:span><text:span text:style-name="T1">心他喝醉了</text:span><text:span text:style-name="T5">傷</text:span><text:span text:style-name="T1">肝，抽</text:span><text:span text:style-name="T5">煙傷</text:span><text:span text:style-name="T1">肺，再也不用惦</text:span><text:span text:style-name="T5">記</text:span><text:span text:style-name="T1">着</text:span><text:span text:style-name="T5">給</text:span><text:span text:style-name="T1">他爸爸</text:span><text:span text:style-name="T5">媽媽</text:span><text:span text:style-name="T1">寄生活</text:span><text:span text:style-name="T5">費</text:span><text:span text:style-name="T1">，你可以</text:span><text:span text:style-name="T5">過</text:span><text:span text:style-name="T1">你自己的生活了，找回你自己！你</text:span><text:span text:style-name="T5">說</text:span><text:span text:style-name="T1">是不是！搏一搏，</text:span><text:span text:style-name="T5">無論輸贏</text:span><text:span text:style-name="T1">，你都有巨大的收</text:span><text:span text:style-name="T5">獲</text:span><text:span text:style-name="T1">！（</text:span><text:span text:style-name="T5">幫</text:span><text:span text:style-name="T1">助</text:span><text:span text:style-name="T5">顧</text:span><text:span text:style-name="T1">客分析好具</text:span><text:span text:style-name="T5">體</text:span><text:span text:style-name="T1">的</text:span><text:span text:style-name="T5">實</text:span><text:span text:style-name="T1">施</text:span><text:span text:style-name="T5">細節</text:span><text:span text:style-name="T1">和退路，消除</text:span><text:span text:style-name="T5">顧</text:span><text:span text:style-name="T1">客的后</text:span><text:span text:style-name="T5">顧</text:span><text:span text:style-name="T1">之</text:span><text:span text:style-name="T5">憂</text:span><text:span text:style-name="T1">！）</text:span></text:p>
      <text:p text:style-name="P8"><text:span text:style-name="T5">顧</text:span><text:span text:style-name="T1">客</text:span><text:span text:style-name="T5">趙</text:span><text:span text:style-name="T1">小青：好的，我</text:span><text:span text:style-name="T5">聽</text:span><text:span text:style-name="T1">你的！董</text:span><text:span text:style-name="T5">醫</text:span><text:span text:style-name="T1">生，我</text:span><text:span text:style-name="T5">聽</text:span><text:span text:style-name="T1">你的！（前有光明，后有退路，中有</text:span><text:span text:style-name="T5">計謀</text:span><text:span text:style-name="T1">，</text:span><text:span text:style-name="T5">顧</text:span><text:span text:style-name="T1">客大部分都</text:span><text:span text:style-name="T5">會釆納</text:span><text:span text:style-name="T1">的！）</text:span></text:p>
      <text:p text:style-name="P5"/>
      <text:p text:style-name="P8"><text:soft-page-break/><text:span text:style-name="T1">下班后，董冰</text:span><text:span text:style-name="T5">帶</text:span><text:span text:style-name="T1">着小青去</text:span><text:span text:style-name="T5">選購</text:span><text:span text:style-name="T1">了衣服，</text:span><text:span text:style-name="T5">購買</text:span><text:span text:style-name="T1">了高</text:span><text:span text:style-name="T5">檔</text:span><text:span text:style-name="T1">化</text:span><text:span text:style-name="T5">妝</text:span><text:span text:style-name="T1">品，做了漂亮的</text:span><text:span text:style-name="T5">頭發</text:span><text:span text:style-name="T1">！并</text:span><text:span text:style-name="T5">約</text:span><text:span text:style-name="T1">定第二天，做腹部的</text:span><text:span text:style-name="T5">熱瑪</text:span><text:span text:style-name="T1">吉和鼻部的微整形，小青要在董冰的策划下</text:span><text:span text:style-name="T5">發</text:span><text:span text:style-name="T1">生</text:span><text:span text:style-name="T5">蛻變</text:span><text:span text:style-name="T1">了！在董冰的安排下，小青把孩子送</text:span><text:span text:style-name="T5">給</text:span><text:span text:style-name="T1">了</text:span><text:span text:style-name="T5">媽媽帶</text:span><text:span text:style-name="T1">，她</text:span><text:span text:style-name="T5">開</text:span><text:span text:style-name="T1">始全方位的改</text:span><text:span text:style-name="T5">變</text:span><text:span text:style-name="T1">和包</text:span><text:span text:style-name="T5">裝</text:span><text:span text:style-name="T1">自己。</text:span><text:span text:style-name="T5">當</text:span><text:span text:style-name="T1">一周后再次出</text:span><text:span text:style-name="T5">現</text:span><text:span text:style-name="T1">在老公面前的</text:span><text:span text:style-name="T5">時</text:span><text:span text:style-name="T1">候，老公留下的只是不</text:span><text:span text:style-name="T5">斷</text:span><text:span text:style-name="T1">的</text:span><text:span text:style-name="T5">驚嘆</text:span><text:span text:style-name="T1">：原</text:span><text:span text:style-name="T5">來</text:span><text:span text:style-name="T1">自己家的</text:span><text:span text:style-name="T5">黃臉</text:span><text:span text:style-name="T1">婆也可以</text:span><text:span text:style-name="T5">這</text:span><text:span text:style-name="T1">么漂亮！（心病</text:span><text:span text:style-name="T5">還須</text:span><text:span text:style-name="T1">心</text:span><text:span text:style-name="T5">藥醫</text:span><text:span text:style-name="T1">，解</text:span><text:span text:style-name="T5">鈴還須</text:span><text:span text:style-name="T1">系</text:span><text:span text:style-name="T5">鈴</text:span><text:span text:style-name="T1">人，</text:span><text:span text:style-name="T5">讓顧</text:span><text:span text:style-name="T1">客自己改</text:span><text:span text:style-name="T5">變</text:span><text:span text:style-name="T1">才是解</text:span><text:span text:style-name="T5">決問題</text:span><text:span text:style-name="T1">的</text:span><text:span text:style-name="T5">關鍵</text:span><text:span text:style-name="T1">！）</text:span></text:p>
      <text:p text:style-name="P5"/>
      <text:p text:style-name="P5"/>
      <text:p text:style-name="P8"><text:span text:style-name="T1">董冰教</text:span><text:span text:style-name="T5">給</text:span><text:span text:style-name="T1">小青</text:span><text:span text:style-name="T5">說</text:span><text:span text:style-name="T1">的那些</text:span><text:span text:style-name="T5">話</text:span><text:span text:style-name="T1">，打</text:span><text:span text:style-name="T5">動</text:span><text:span text:style-name="T1">了老公，他想了很久，最</text:span><text:span text:style-name="T5">終決</text:span><text:span text:style-name="T1">定</text:span><text:span text:style-name="T5">還</text:span><text:span text:style-name="T1">是</text:span><text:span text:style-name="T5">結</text:span><text:span text:style-name="T1">束了跟露西的</text:span><text:span text:style-name="T5">戀</text:span><text:span text:style-name="T1">情，重新回到小青母子的身</text:span><text:span text:style-name="T5">邊</text:span><text:span text:style-name="T1">！</text:span><text:span text:style-name="T5">雖</text:span><text:span text:style-name="T1">然婚姻保住了，但小青的心已</text:span><text:span text:style-name="T5">經</text:span><text:span text:style-name="T1">被</text:span><text:span text:style-name="T5">傷</text:span><text:span text:style-name="T1">的</text:span><text:span text:style-name="T5">細</text:span><text:span text:style-name="T1">碎，一</text:span><text:span text:style-name="T5">塊</text:span><text:span text:style-name="T1">破了的</text:span><text:span text:style-name="T5">鏡</text:span><text:span text:style-name="T1">子即便粘合的再完美，也</text:span><text:span text:style-name="T5">無</text:span><text:span text:style-name="T1">法展</text:span><text:span text:style-name="T5">現當</text:span><text:span text:style-name="T1">初的光</text:span><text:span text:style-name="T5">澤</text:span><text:span text:style-name="T1">！</text:span><text:span text:style-name="T5">經曆過</text:span><text:span text:style-name="T1">婚姻生死之后，小青</text:span><text:span text:style-name="T5">徹</text:span><text:span text:style-name="T1">底改</text:span><text:span text:style-name="T5">變</text:span><text:span text:style-name="T1">了自己，她每</text:span><text:span text:style-name="T5">個</text:span><text:span text:style-name="T1">月都要</text:span><text:span text:style-name="T5">來</text:span><text:span text:style-name="T1">找董冰做美容，去做瑜伽，并找了一份工作，成</text:span><text:span text:style-name="T5">為</text:span><text:span text:style-name="T1">了一名高</text:span><text:span text:style-name="T5">級</text:span><text:span text:style-name="T1">白</text:span><text:span text:style-name="T5">領</text:span><text:span text:style-name="T1">，成熟而有</text:span><text:span text:style-name="T5">風韻</text:span><text:span text:style-name="T1">的她，</text:span><text:span text:style-name="T5">讓</text:span><text:span text:style-name="T1">老公以她</text:span><text:span text:style-name="T5">為榮</text:span><text:span text:style-name="T1">。而董冰的努力也</text:span><text:span text:style-name="T5">換來</text:span><text:span text:style-name="T1">了小青的信</text:span><text:span text:style-name="T5">賴</text:span><text:span text:style-name="T1">，她不</text:span><text:span text:style-name="T5">僅將</text:span><text:span text:style-name="T1">自己的美</text:span><text:span text:style-name="T5">麗</text:span><text:span text:style-name="T1">事</text:span><text:span text:style-name="T5">業</text:span><text:span text:style-name="T1">全部交</text:span><text:span text:style-name="T5">給</text:span><text:span text:style-name="T1">了董冰，并把自己的故事</text:span><text:span text:style-name="T5">講給</text:span><text:span text:style-name="T1">她的姐妹和同事。董冰的</text:span><text:span text:style-name="T5">顧</text:span><text:span text:style-name="T1">客越</text:span><text:span text:style-name="T5">來</text:span><text:span text:style-name="T1">越多了，她用自己的</text:span><text:span text:style-name="T5">愛來幫</text:span><text:span text:style-name="T1">助每一位姐妹</text:span><text:span text:style-name="T5">變</text:span><text:span text:style-name="T1">得更美</text:span><text:span text:style-name="T5">麗</text:span><text:span text:style-name="T1">！她始</text:span><text:span text:style-name="T5">終</text:span><text:span text:style-name="T1">相信，女人必</text:span><text:span text:style-name="T5">須愛</text:span><text:span text:style-name="T1">自己，否</text:span><text:span text:style-name="T5">則別</text:span><text:span text:style-name="T1">人就不</text:span><text:span text:style-name="T5">會愛</text:span><text:span text:style-name="T1">你！</text:span></text:p>
      <text:p text:style-name="P5"/>
      <text:p text:style-name="P8"><text:span text:style-name="T1">案例分析：董冰的善良、智慧</text:span><text:span text:style-name="T5">幫</text:span><text:span text:style-name="T1">助小青</text:span><text:span text:style-name="T5">擺脫</text:span><text:span text:style-name="T1">了婚姻的危</text:span><text:span text:style-name="T5">機</text:span><text:span text:style-name="T1">，她</text:span><text:span text:style-name="T5">獲</text:span><text:span text:style-name="T1">得的不只是一</text:span><text:span text:style-name="T5">個顧</text:span><text:span text:style-name="T1">客，更在心</text:span><text:span text:style-name="T5">靈</text:span><text:span text:style-name="T1">上得到了升</text:span><text:span text:style-name="T5">華</text:span><text:span text:style-name="T1">。看着在自己手上一</text:span><text:span text:style-name="T5">個個</text:span><text:span text:style-name="T1">美女</text:span><text:span text:style-name="T5">脫穎</text:span><text:span text:style-name="T1">而出，她感到自己的</text:span><text:span text:style-name="T5">職業</text:span><text:span text:style-name="T1">真是天下最好的工作！她</text:span><text:span text:style-name="T5">決</text:span><text:span text:style-name="T1">定用自己的善良、用自己的</text:span><text:span text:style-name="T5">愛</text:span><text:span text:style-name="T1">去</text:span><text:span text:style-name="T5">幫</text:span><text:span text:style-name="T1">助更多的姐妹</text:span><text:span text:style-name="T5">們</text:span><text:span text:style-name="T1">，</text:span><text:soft-page-break/><text:span text:style-name="T5">讓</text:span><text:span text:style-name="T1">她</text:span><text:span text:style-name="T5">們</text:span><text:span text:style-name="T1">都有一</text:span><text:span text:style-name="T5">個</text:span><text:span text:style-name="T1">美</text:span><text:span text:style-name="T5">滿</text:span><text:span text:style-name="T1">幸福的家庭，都能得到自由快</text:span><text:span text:style-name="T5">樂</text:span><text:span text:style-name="T1">的生活！一</text:span><text:span text:style-name="T5">個</text:span><text:span text:style-name="T1">咨</text:span><text:span text:style-name="T5">詢師</text:span><text:span text:style-name="T1">最高的境界就是成</text:span><text:span text:style-name="T5">為</text:span><text:span text:style-name="T1">你</text:span><text:span text:style-name="T5">顧</text:span><text:span text:style-name="T1">客的美</text:span><text:span text:style-name="T5">麗</text:span><text:span text:style-name="T1">管家、心理</text:span><text:span text:style-name="T5">醫</text:span><text:span text:style-name="T1">生和生活管家！</text:span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宋体" svg:font-family="宋体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font-name-asian="Noto Serif CJK TC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en" fo:country="US" style:letter-kerning="true" style:font-name-asian="宋体" style:font-family-asian="宋体" style:font-size-asian="10.5pt" style:language-asian="zh" style:country-asian="CN" style:font-name-complex="Times New Roman" style:font-family-complex="'Times New Roman'" style:font-family-generic-complex="roman" style:font-pitch-complex="variable" style:font-size-complex="10.5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" style:font-family-complex="'Noto Sans CJK TC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 fo:padding-left="0.141cm" fo:padding-right="0.141cm" fo:padding-top="0.035cm" fo:padding-bottom="0.035cm" fo:border="none" style:shadow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Frame_20_contents" style:display-name="Frame contents" style:family="paragraph" style:parent-style-name="Standard" style:class="extra"/>
    <style:style style:name="默认段落字体" style:family="text"/>
    <style:style style:name="Page_20_Number" style:display-name="Page Number" style:family="text" style:parent-style-name="默认段落字体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language="en" fo:country="US" style:font-name-asian="Noto Serif CJK TC" style:language-asian="zh" style:country-asian="TW"/>
    </style:style>
    <style:style style:name="MP2" style:family="paragraph" style:parent-style-name="Header">
      <style:paragraph-properties fo:line-height="100%" fo:text-align="justify" style:justify-single-word="false" fo:orphans="0" fo:widows="0" fo:padding-left="0.141cm" fo:padding-right="0.141cm" fo:padding-top="0.035cm" fo:padding-bottom="0.035cm" fo:border="none" style:shadow="none" style:snap-to-layout-grid="false" style:writing-mode="lr-tb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fo:language="en" fo:country="US" style:font-name-asian="Noto Serif CJK TC" style:font-size-asian="9pt" style:language-asian="zh" style:country-asian="TW"/>
    </style:style>
    <style:style style:name="MP4" style:family="paragraph" style:parent-style-name="Standard">
      <style:paragraph-properties style:snap-to-layout-grid="false"/>
      <style:text-properties fo:font-size="9pt" style:font-size-asian="9pt" style:language-asian="zh" style:country-asian="CN"/>
    </style:style>
    <style:style style:name="MT1" style:family="text">
      <style:text-properties fo:language="en" fo:country="US" style:font-name-asian="Noto Serif CJK TC" style:language-asian="zh" style:country-asian="TW"/>
    </style:style>
    <style:style style:name="MT2" style:family="text">
      <style:text-properties style:use-window-font-color="true" loext:opacity="0%" style:font-name="Times New Roman" fo:font-size="9pt" fo:language="en" fo:country="US" style:letter-kerning="true" style:font-name-asian="Noto Serif CJK TC" style:font-size-asian="9pt" style:language-asian="zh" style:country-asian="TW" style:font-name-complex="Times New Roman" style:font-size-complex="10.5pt" style:language-complex="ar" style:country-complex="SA"/>
    </style:style>
    <style:style style:name="MT3" style:family="text">
      <style:text-properties fo:language="en" fo:country="US" style:language-asian="zh" style:country-asian="CN"/>
    </style:style>
    <style:style style:name="M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fo:padding="0.002cm" fo:border="none"/>
    </style:style>
    <style:page-layout style:name="Mpm1">
      <style:page-layout-properties fo:page-width="21.001cm" fo:page-height="29.7cm" style:num-format="1" style:print-orientation="portrait" fo:margin-top="1.501cm" fo:margin-bottom="1.75cm" fo:margin-left="2.78cm" fo:margin-right="2.78cm" style:writing-mode="lr-tb" style:layout-grid-color="#c0c0c0" style:layout-grid-lines="48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14cm" fo:margin-bottom="2.041cm" style:dynamic-spacing="true"/>
      </style:header-style>
      <style:footer-style>
        <style:header-footer-properties fo:min-height="1.79cm" fo:margin-top="1.69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  <text:p text:style-name="MP1"/>
        <text:p text:style-name="MP1"/>
        <text:p text:style-name="MP2"><text:span text:style-name="MT1">更多行</text:span><text:span text:style-name="MT2">業書</text:span><text:span text:style-name="MT1">籍</text:span><text:span text:style-name="MT2">請</text:span><text:span text:style-name="MT1">搜索淘</text:span><text:span text:style-name="MT2">寶</text:span><text:span text:style-name="MT1">店名: </text:span><text:span text:style-name="MT3">起点资料文库</text:span></text:p>
        <text:p text:style-name="MP1"/>
      </style:header>
      <style:footer>
        <text:p text:style-name="MP3"><draw:frame draw:style-name="Mfr1" draw:name="外框1" text:anchor-type="char" svg:x="7.565cm" svg:y="0cm" draw:z-index="6"><draw:text-box fo:min-height="0cm" fo:min-width="0cm"><text:p text:style-name="MP4"><text:page-number text:select-page="current">7</text:page-number></text:p></draw:text-box></draw:frame><text:s text:c="7"/></text:p>
        <text:p text:style-name="MP3"/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刘一秒 影响智慧01 课程笔记</dc:title>
    <meta:initial-creator>Administrator</meta:initial-creator>
    <meta:creation-date>2014-04-12T08:30:17</meta:creation-date>
    <dc:date>2024-04-29T11:34:35.845316491</dc:date>
    <meta:print-date>2015-05-03T21:36:00</meta:print-date>
    <meta:editing-cycles>2</meta:editing-cycles>
    <meta:editing-duration>PT1M53S</meta:editing-duration>
    <meta:document-statistic meta:table-count="0" meta:image-count="0" meta:object-count="0" meta:page-count="7" meta:paragraph-count="27" meta:word-count="3197" meta:character-count="3208" meta:non-whitespace-character-count="3198"/>
    <meta:generator>LibreOffice/7.3.7.2$Linux_X86_64 LibreOffice_project/30$Build-2</meta:generator>
    <meta:user-defined meta:name="KSOProductBuildVer">2052-11.1.0.8214</meta:user-defined>
  </office:meta>
</office:document-meta>
</file>